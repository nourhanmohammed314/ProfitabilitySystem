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5.166cm" fo:min-width="5.93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fill-color="#ffffff" draw:textarea-vertical-align="middle" loext:decorative="false"/>
    </style:style>
    <style:style style:name="gr3" style:family="graphic" style:parent-style-name="standard">
      <style:graphic-properties draw:stroke="none" draw:fill="none" draw:fill-color="#ffffff" fo:min-height="0.713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1.627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fill-color="#ffffff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fill-color="#ffffff" draw:textarea-vertical-align="middle" loext:decorative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4.641cm" fo:min-width="4.14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4.608cm" fo:min-width="3.509cm" loext:decorative="false"/>
    </style:style>
    <style:style style:name="gr9" style:family="graphic" style:parent-style-name="standard">
      <style:graphic-properties draw:stroke="none" draw:fill="none" draw:fill-color="#ffffff" fo:min-height="0.87cm" loext:decorative="false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5.232cm" fo:min-width="6.61cm" loext:decorative="false"/>
    </style:style>
    <style:style style:name="gr11" style:family="graphic" style:parent-style-name="standard">
      <style:graphic-properties draw:stroke="none" draw:fill="none" draw:fill-color="#ffffff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789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396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1.183cm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4.85cm" fo:min-width="6.7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1.577cm" loext:decorative="false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5.078cm" fo:min-width="7.496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6.594cm" fo:min-width="6.732cm" loext:decorative="false"/>
    </style:style>
    <style:style style:name="gr19" style:family="graphic" style:parent-style-name="standard">
      <style:graphic-properties draw:stroke="none" draw:fill="none" fo:min-height="0.561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38cm" svg:height="5.416cm" svg:x="1.758cm" svg:y="1.3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977cm" svg:y1="1.375cm" svg:x2="4.977cm" svg:y2="1.375cm" draw:start-shape="id1" draw:end-shape="id1" svg:d="M4977 1375z" svg:viewBox="0 0 1 1">
          <text:p/>
        </draw:connector>
        <draw:line draw:style-name="gr2" draw:text-style-name="P2" draw:layer="layout" svg:x1="1.746cm" svg:y1="2.14cm" svg:x2="8.162cm" svg:y2="2.101cm">
          <text:p/>
        </draw:line>
        <draw:frame draw:style-name="gr3" draw:text-style-name="P3" draw:layer="layout" svg:width="2.62cm" svg:height="0.963cm" svg:x="3.613cm" svg:y="1.219cm">
          <draw:text-box>
            <text:p>product</text:p>
          </draw:text-box>
        </draw:frame>
        <draw:frame draw:style-name="gr4" draw:text-style-name="P4" draw:layer="layout" svg:width="4.725cm" svg:height="1.877cm" svg:x="1.993cm" svg:y="2.308cm">
          <draw:text-box>
            <text:p><text:span text:style-name="T1">Name</text:span></text:p>
            <text:p><text:span text:style-name="T1">Selling price</text:span></text:p>
            <text:p><text:span text:style-name="T1">Incur cost </text:span></text:p>
            <text:p><text:span text:style-name="T1">Selling units</text:span></text:p>
          </draw:text-box>
        </draw:frame>
        <draw:line draw:style-name="gr2" draw:text-style-name="P2" draw:layer="layout" svg:x1="1.62cm" svg:y1="4.105cm" svg:x2="8.178cm" svg:y2="4.057cm">
          <text:p/>
        </draw:line>
        <draw:line draw:style-name="gr5" draw:text-style-name="P2" draw:layer="layout" svg:x1="4.955cm" svg:y1="6.959cm" svg:x2="3.752cm" svg:y2="9.204cm">
          <text:p/>
        </draw:line>
        <draw:line draw:style-name="gr6" draw:text-style-name="P2" draw:layer="layout" svg:x1="4.987cm" svg:y1="6.991cm" svg:x2="7.216cm" svg:y2="8.964cm">
          <text:p/>
        </draw:line>
        <draw:custom-shape draw:style-name="gr1" draw:text-style-name="P1" xml:id="id2" draw:id="id2" draw:layer="layout" svg:width="6.438cm" svg:height="5.416cm" svg:x="1.758cm" svg:y="1.3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977cm" svg:y1="1.375cm" svg:x2="4.977cm" svg:y2="1.375cm" draw:start-shape="id2" draw:end-shape="id2" svg:d="M4977 1375z" svg:viewBox="0 0 1 1">
          <text:p/>
        </draw:connector>
        <draw:line draw:style-name="gr2" draw:text-style-name="P2" draw:layer="layout" svg:x1="1.746cm" svg:y1="2.14cm" svg:x2="8.162cm" svg:y2="2.101cm">
          <text:p/>
        </draw:line>
        <draw:frame draw:style-name="gr3" draw:text-style-name="P3" draw:layer="layout" svg:width="2.62cm" svg:height="0.963cm" svg:x="3.613cm" svg:y="1.219cm">
          <draw:text-box>
            <text:p>product</text:p>
          </draw:text-box>
        </draw:frame>
        <draw:frame draw:style-name="gr4" draw:text-style-name="P4" draw:layer="layout" svg:width="4.725cm" svg:height="1.877cm" svg:x="1.993cm" svg:y="2.308cm">
          <draw:text-box>
            <text:p><text:span text:style-name="T1">Name</text:span></text:p>
            <text:p><text:span text:style-name="T1">Selling price</text:span></text:p>
            <text:p><text:span text:style-name="T1">Incur cost </text:span></text:p>
            <text:p><text:span text:style-name="T1">Selling units</text:span></text:p>
          </draw:text-box>
        </draw:frame>
        <draw:line draw:style-name="gr2" draw:text-style-name="P2" draw:layer="layout" svg:x1="1.62cm" svg:y1="4.105cm" svg:x2="8.178cm" svg:y2="4.057cm">
          <text:p/>
        </draw:line>
        <draw:custom-shape draw:style-name="gr1" draw:text-style-name="P1" xml:id="id3" draw:id="id3" draw:layer="layout" svg:width="6.438cm" svg:height="5.416cm" svg:x="1.758cm" svg:y="1.3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977cm" svg:y1="1.375cm" svg:x2="4.977cm" svg:y2="1.375cm" draw:start-shape="id3" draw:end-shape="id3" svg:d="M4977 1375z" svg:viewBox="0 0 1 1">
          <text:p/>
        </draw:connector>
        <draw:line draw:style-name="gr2" draw:text-style-name="P2" draw:layer="layout" svg:x1="1.746cm" svg:y1="2.14cm" svg:x2="8.162cm" svg:y2="2.101cm">
          <text:p/>
        </draw:line>
        <draw:frame draw:style-name="gr3" draw:text-style-name="P3" draw:layer="layout" svg:width="2.62cm" svg:height="0.963cm" svg:x="3.613cm" svg:y="1.219cm">
          <draw:text-box>
            <text:p>product</text:p>
          </draw:text-box>
        </draw:frame>
        <draw:frame draw:style-name="gr4" draw:text-style-name="P4" draw:layer="layout" svg:width="4.725cm" svg:height="1.877cm" svg:x="1.993cm" svg:y="2.308cm">
          <draw:text-box>
            <text:p><text:span text:style-name="T1">Name</text:span></text:p>
            <text:p><text:span text:style-name="T1">Selling price</text:span></text:p>
            <text:p><text:span text:style-name="T1">Incur cost </text:span></text:p>
            <text:p><text:span text:style-name="T1">Selling units</text:span></text:p>
          </draw:text-box>
        </draw:frame>
        <draw:line draw:style-name="gr2" draw:text-style-name="P2" draw:layer="layout" svg:x1="1.62cm" svg:y1="4.105cm" svg:x2="8.178cm" svg:y2="4.057cm">
          <text:p/>
        </draw:line>
        <draw:custom-shape draw:style-name="gr1" draw:text-style-name="P1" xml:id="id4" draw:id="id4" draw:layer="layout" svg:width="6.438cm" svg:height="5.416cm" svg:x="1.758cm" svg:y="1.3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977cm" svg:y1="1.375cm" svg:x2="4.977cm" svg:y2="1.375cm" draw:start-shape="id4" draw:end-shape="id4" svg:d="M4977 1375z" svg:viewBox="0 0 1 1">
          <text:p/>
        </draw:connector>
        <draw:line draw:style-name="gr2" draw:text-style-name="P2" draw:layer="layout" svg:x1="1.746cm" svg:y1="2.14cm" svg:x2="8.162cm" svg:y2="2.101cm">
          <text:p/>
        </draw:line>
        <draw:frame draw:style-name="gr3" draw:text-style-name="P3" draw:layer="layout" svg:width="2.62cm" svg:height="0.963cm" svg:x="3.613cm" svg:y="1.219cm">
          <draw:text-box>
            <text:p>product</text:p>
          </draw:text-box>
        </draw:frame>
        <draw:frame draw:style-name="gr4" draw:text-style-name="P4" draw:layer="layout" svg:width="4.725cm" svg:height="1.877cm" svg:x="1.993cm" svg:y="2.308cm">
          <draw:text-box>
            <text:p><text:span text:style-name="T1">Name</text:span></text:p>
            <text:p><text:span text:style-name="T1">Selling price</text:span></text:p>
            <text:p><text:span text:style-name="T1">Incur cost </text:span></text:p>
            <text:p><text:span text:style-name="T1">Selling units</text:span></text:p>
          </draw:text-box>
        </draw:frame>
        <draw:line draw:style-name="gr2" draw:text-style-name="P2" draw:layer="layout" svg:x1="1.62cm" svg:y1="4.105cm" svg:x2="8.178cm" svg:y2="4.057cm">
          <text:p/>
        </draw:line>
        <draw:custom-shape draw:style-name="gr1" draw:text-style-name="P1" xml:id="id5" draw:id="id5" draw:layer="layout" svg:width="6.438cm" svg:height="5.416cm" svg:x="1.758cm" svg:y="1.3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977cm" svg:y1="1.375cm" svg:x2="4.977cm" svg:y2="1.375cm" draw:start-shape="id5" draw:end-shape="id5" svg:d="M4977 1375z" svg:viewBox="0 0 1 1">
          <text:p/>
        </draw:connector>
        <draw:line draw:style-name="gr2" draw:text-style-name="P2" draw:layer="layout" svg:x1="1.746cm" svg:y1="2.14cm" svg:x2="8.162cm" svg:y2="2.101cm">
          <text:p/>
        </draw:line>
        <draw:frame draw:style-name="gr3" draw:text-style-name="P3" draw:layer="layout" svg:width="2.62cm" svg:height="0.963cm" svg:x="3.613cm" svg:y="1.219cm">
          <draw:text-box>
            <text:p>product</text:p>
          </draw:text-box>
        </draw:frame>
        <draw:frame draw:style-name="gr4" draw:text-style-name="P4" draw:layer="layout" svg:width="4.725cm" svg:height="1.877cm" svg:x="1.993cm" svg:y="2.308cm">
          <draw:text-box>
            <text:p><text:span text:style-name="T1">Name</text:span></text:p>
            <text:p><text:span text:style-name="T1">Selling price</text:span></text:p>
            <text:p><text:span text:style-name="T1">Incur cost </text:span></text:p>
            <text:p><text:span text:style-name="T1">Selling units</text:span></text:p>
          </draw:text-box>
        </draw:frame>
        <draw:line draw:style-name="gr2" draw:text-style-name="P2" draw:layer="layout" svg:x1="1.62cm" svg:y1="4.105cm" svg:x2="8.178cm" svg:y2="4.057cm">
          <text:p/>
        </draw:line>
        <draw:custom-shape draw:style-name="gr1" draw:text-style-name="P1" xml:id="id6" draw:id="id6" draw:layer="layout" svg:width="6.438cm" svg:height="5.416cm" svg:x="1.758cm" svg:y="1.3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977cm" svg:y1="1.375cm" svg:x2="4.977cm" svg:y2="1.375cm" draw:start-shape="id6" draw:end-shape="id6" svg:d="M4977 1375z" svg:viewBox="0 0 1 1">
          <text:p/>
        </draw:connector>
        <draw:line draw:style-name="gr2" draw:text-style-name="P2" draw:layer="layout" svg:x1="1.746cm" svg:y1="2.14cm" svg:x2="8.162cm" svg:y2="2.101cm">
          <text:p/>
        </draw:line>
        <draw:frame draw:style-name="gr3" draw:text-style-name="P3" draw:layer="layout" svg:width="2.62cm" svg:height="0.963cm" svg:x="3.613cm" svg:y="1.219cm">
          <draw:text-box>
            <text:p>product</text:p>
          </draw:text-box>
        </draw:frame>
        <draw:frame draw:style-name="gr4" draw:text-style-name="P4" draw:layer="layout" svg:width="4.725cm" svg:height="1.877cm" svg:x="1.993cm" svg:y="2.308cm">
          <draw:text-box>
            <text:p><text:span text:style-name="T1">Name</text:span></text:p>
            <text:p><text:span text:style-name="T1">ProductId</text:span></text:p>
            <text:p><text:span text:style-name="T1">Selling price</text:span></text:p>
            <text:p><text:span text:style-name="T1">costcomponents</text:span></text:p>
          </draw:text-box>
        </draw:frame>
        <draw:line draw:style-name="gr2" draw:text-style-name="P2" draw:layer="layout" svg:x1="1.62cm" svg:y1="4.105cm" svg:x2="8.178cm" svg:y2="4.057cm">
          <text:p/>
        </draw:line>
        <draw:custom-shape draw:style-name="gr7" draw:text-style-name="P1" draw:layer="layout" svg:width="4.648cm" svg:height="4.891cm" svg:x="1.539cm" svg:y="9.3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009cm" svg:height="4.858cm" svg:x="6.895cm" svg:y="9.26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71cm" svg:y1="10.006cm" svg:x2="6.126cm" svg:y2="10.022cm">
          <text:p/>
        </draw:line>
        <draw:line draw:style-name="gr2" draw:text-style-name="P2" draw:layer="layout" svg:x1="6.895cm" svg:y1="10.022cm" svg:x2="10.856cm" svg:y2="9.974cm">
          <text:p/>
        </draw:line>
        <draw:frame draw:style-name="gr3" draw:text-style-name="P6" draw:layer="layout" svg:width="4.985cm" svg:height="0.963cm" svg:x="1.78cm" svg:y="9.22cm">
          <draw:text-box>
            <text:p><text:span text:style-name="T2">PhysicalProduct</text:span></text:p>
          </draw:text-box>
        </draw:frame>
        <draw:frame draw:style-name="gr3" draw:text-style-name="P6" draw:layer="layout" svg:width="5.139cm" svg:height="0.963cm" svg:x="6.703cm" svg:y="9.268cm">
          <draw:text-box>
            <text:p><text:span text:style-name="T2">ServiceOffering</text:span></text:p>
          </draw:text-box>
        </draw:frame>
        <draw:frame draw:style-name="gr9" draw:text-style-name="P7" draw:layer="layout" svg:width="4.673cm" svg:height="1.12cm" svg:x="1.879cm" svg:y="10.172cm">
          <draw:text-box>
            <text:p><text:span text:style-name="T3">StorageCost</text:span></text:p>
          </draw:text-box>
        </draw:frame>
        <draw:line draw:style-name="gr2" draw:text-style-name="P2" draw:layer="layout" svg:x1="1.507cm" svg:y1="11.417cm" svg:x2="6.238cm" svg:y2="11.449cm">
          <text:p/>
        </draw:line>
        <draw:line draw:style-name="gr2" draw:text-style-name="P2" draw:layer="layout" svg:x1="6.927cm" svg:y1="11.048cm" svg:x2="10.92cm" svg:y2="11.032cm">
          <text:p/>
        </draw:line>
        <draw:custom-shape draw:style-name="gr10" draw:text-style-name="P5" draw:layer="layout" svg:width="7.11cm" svg:height="5.482cm" svg:x="12.754cm" svg:y="1.23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52cm" svg:y1="2.213cm" svg:x2="19.836cm" svg:y2="2.229cm">
          <text:p/>
        </draw:line>
        <draw:frame draw:style-name="gr11" draw:text-style-name="P3" draw:layer="layout" svg:width="6.028cm" svg:height="0.962cm" svg:x="13.134cm" svg:y="1.3cm">
          <draw:text-box>
            <text:p>CostComponent</text:p>
          </draw:text-box>
        </draw:frame>
        <draw:frame draw:style-name="gr12" draw:text-style-name="P7" draw:layer="layout" svg:width="4.89cm" svg:height="1.039cm" svg:x="6.755cm" svg:y="9.993cm">
          <draw:text-box>
            <text:p text:style-name="P8"><text:span text:style-name="T3">HoursPerUnit</text:span></text:p>
            <text:p text:style-name="P8"><text:span text:style-name="T3">HourlylaborRate</text:span></text:p>
          </draw:text-box>
        </draw:frame>
        <draw:frame draw:style-name="gr13" draw:text-style-name="P3" draw:layer="layout" svg:width="5.19cm" svg:height="0.646cm" svg:x="2.164cm" svg:y="4.423cm">
          <draw:text-box>
            <text:p><text:span text:style-name="T3">Cost-</text:span><text:span text:style-name="T3">Calculation()</text:span></text:p>
          </draw:text-box>
        </draw:frame>
        <draw:frame draw:style-name="gr14" draw:text-style-name="P3" draw:layer="layout" svg:width="6.206cm" svg:height="1.433cm" svg:x="13.05cm" svg:y="2.614cm">
          <draw:text-box>
            <text:p><text:span text:style-name="T3">Name</text:span></text:p>
            <text:p><text:span text:style-name="T3">Amount</text:span></text:p>
            <text:p><text:span text:style-name="T3">type</text:span></text:p>
          </draw:text-box>
        </draw:frame>
        <draw:line draw:style-name="gr2" draw:text-style-name="P2" draw:layer="layout" svg:x1="12.909cm" svg:y1="5.078cm" svg:x2="20.029cm" svg:y2="5.03cm">
          <text:p/>
        </draw:line>
        <draw:custom-shape draw:style-name="gr15" draw:text-style-name="P1" draw:layer="layout" svg:width="7.2cm" svg:height="5.1cm" svg:x="12.763cm" svg:y="9.0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16cm" svg:y1="10.183cm" svg:x2="19.98cm" svg:y2="10.167cm">
          <text:p/>
        </draw:line>
        <draw:frame draw:style-name="gr11" draw:text-style-name="P3" draw:layer="layout" svg:width="5.901cm" svg:height="0.962cm" svg:x="13.774cm" svg:y="9.156cm">
          <draw:text-box>
            <text:p><text:span text:style-name="T4">SaleTransaction</text:span></text:p>
          </draw:text-box>
        </draw:frame>
        <draw:frame draw:style-name="gr16" draw:text-style-name="P3" draw:layer="layout" svg:width="6.196cm" svg:height="1.827cm" svg:x="13.431cm" svg:y="10.308cm">
          <draw:text-box>
            <text:p><text:span text:style-name="T3">ProductId</text:span></text:p>
            <text:p><text:span text:style-name="T3">Quantity</text:span></text:p>
            <text:p><text:span text:style-name="T3">Price</text:span></text:p>
            <text:p><text:span text:style-name="T3">Date</text:span></text:p>
          </draw:text-box>
        </draw:frame>
        <draw:line draw:style-name="gr2" draw:text-style-name="P2" draw:layer="layout" svg:x1="12.78cm" svg:y1="12.603cm" svg:x2="19.932cm" svg:y2="12.555cm">
          <text:p/>
        </draw:line>
        <draw:custom-shape draw:style-name="gr17" draw:text-style-name="P1" draw:layer="layout" svg:width="7.996cm" svg:height="5.328cm" svg:x="1.725cm" svg:y="15.98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07cm" svg:y1="17.365cm" svg:x2="9.76cm" svg:y2="17.404cm">
          <text:p/>
        </draw:line>
        <draw:frame draw:style-name="gr3" draw:text-style-name="P3" draw:layer="layout" svg:width="5.584cm" svg:height="0.963cm" svg:x="3.087cm" svg:y="16.139cm">
          <draw:text-box>
            <text:p>MonthlyFixedCost</text:p>
          </draw:text-box>
        </draw:frame>
        <draw:line draw:style-name="gr2" draw:text-style-name="P2" draw:layer="layout" svg:x1="1.722cm" svg:y1="19.735cm" svg:x2="9.753cm" svg:y2="19.714cm">
          <text:p/>
        </draw:line>
        <draw:frame draw:style-name="gr14" draw:text-style-name="P7" draw:layer="layout" svg:width="6.361cm" svg:height="1.433cm" svg:x="13.187cm" svg:y="5.292cm">
          <draw:text-box>
            <text:p><text:span text:style-name="T3"/></text:p>
            <text:p text:style-name="P8"><text:span text:style-name="T3"/></text:p>
          </draw:text-box>
        </draw:frame>
        <draw:frame draw:style-name="gr13" draw:text-style-name="P3" draw:layer="layout" svg:width="5.793cm" svg:height="0.646cm" svg:x="2.158cm" svg:y="20.201cm">
          <draw:text-box>
            <text:p><text:span text:style-name="T3">ProductFixedCostShare()</text:span></text:p>
          </draw:text-box>
        </draw:frame>
        <draw:frame draw:style-name="gr12" draw:text-style-name="P3" draw:layer="layout" svg:width="3.67cm" svg:height="1.039cm" svg:x="7.022cm" svg:y="11.343cm">
          <draw:text-box>
            <text:p><text:span text:style-name="T3">Cost-Calculation()</text:span></text:p>
          </draw:text-box>
        </draw:frame>
        <draw:frame draw:style-name="gr12" draw:text-style-name="P3" draw:layer="layout" svg:width="3.772cm" svg:height="1.039cm" svg:x="2.035cm" svg:y="11.837cm">
          <draw:text-box>
            <text:p><text:span text:style-name="T3">Cost-Calculation()</text:span></text:p>
          </draw:text-box>
        </draw:frame>
        <draw:custom-shape draw:style-name="gr18" draw:text-style-name="P5" draw:layer="layout" svg:width="7.232cm" svg:height="6.844cm" svg:x="12.383cm" svg:y="16.08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348cm" svg:height="0.963cm" svg:x="12.237cm" svg:y="16.277cm">
          <draw:text-box>
            <text:p>ProfitabilityClassification</text:p>
          </draw:text-box>
        </draw:frame>
        <draw:line draw:style-name="gr2" draw:text-style-name="P2" draw:layer="layout" svg:x1="12.418cm" svg:y1="17.745cm" svg:x2="19.58cm" svg:y2="17.674cm">
          <text:p/>
        </draw:line>
        <draw:line draw:style-name="gr2" draw:text-style-name="P2" draw:layer="measurelines" svg:x1="12.429cm" svg:y1="20.027cm" svg:x2="19.539cm" svg:y2="19.946cm">
          <text:p/>
        </draw:line>
        <draw:frame draw:style-name="gr16" draw:text-style-name="P3" draw:layer="measurelines" svg:width="6.414cm" svg:height="1.827cm" svg:x="12.601cm" svg:y="20.457cm">
          <draw:text-box>
            <text:p><text:span text:style-name="T3">Break-evenCalculate()</text:span></text:p>
            <text:p><text:span text:style-name="T3">RevenueCalculate()</text:span></text:p>
            <text:p><text:span text:style-name="T3">CalculateMarginOfSafety() ClassifyProduct() </text:span></text:p>
          </draw:text-box>
        </draw:frame>
        <draw:frame draw:style-name="gr19" draw:text-style-name="P10" draw:layer="layout" svg:width="7.727cm" svg:height="2.273cm" svg:x="1.781cm" svg:y="17.615cm">
          <draw:text-box>
            <text:p text:style-name="P9">Description</text:p>
            <text:p text:style-name="P9"><text:s/>Amount </text:p>
            <text:p text:style-name="P9">Month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1T00:07:56.884085700</meta:creation-date>
    <dc:date>2026-07-06T16:57:46.101143100</dc:date>
    <meta:editing-duration>PT19H13M1S</meta:editing-duration>
    <meta:editing-cycles>3</meta:editing-cycles>
    <meta:generator>LibreOffice/25.8.7.2$Windows_X86_64 LibreOffice_project/e9cfafff50477fae0fcf42925ebd2aec2bdc5df4</meta:generator>
    <meta:document-statistic meta:object-count="73"/>
  </office:meta>
</office:document-meta>
</file>